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70C00000FFAAB85D632.png" manifest:media-type="image/png"/>
  <manifest:file-entry manifest:full-path="Pictures/1000000100000FAC000008B03BCFC06C.png" manifest:media-type="image/png"/>
  <manifest:file-entry manifest:full-path="Pictures/1000000100000A3F00001052A54C6E19.png" manifest:media-type="image/png"/>
  <manifest:file-entry manifest:full-path="Pictures/1000000100000B47000009FA584CE4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1.924cm"/>
    </style:style>
    <style:style style:name="Table1.B" style:family="table-column">
      <style:table-column-properties style:column-width="1.385cm"/>
    </style:style>
    <style:style style:name="Table1.C" style:family="table-column">
      <style:table-column-properties style:column-width="4.348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Table1.A3" style:family="table-cell">
      <style:table-cell-properties style:vertical-align="middle" fo:background-color="#ffffff" fo:padding="0.191cm" fo:border-left="0.75pt solid #000000" fo:border-right="0.75pt solid #000000" fo:border-top="none" fo:border-bottom="0.75pt solid #000000">
        <style:background-image/>
      </style:table-cell-properties>
    </style:style>
    <style:style style:name="P1" style:family="paragraph" style:parent-style-name="Standard" style:list-style-name="">
      <style:paragraph-properties fo:margin-top="0cm" fo:margin-bottom="0.423cm" style:contextual-spacing="false" style:line-height-at-least="0.508cm"/>
    </style:style>
    <style:style style:name="P2" style:family="paragraph" style:parent-style-name="Standard">
      <loext:graphic-properties draw:fill="solid" draw:fill-color="#ffffff"/>
      <style:paragraph-properties fo:margin-top="0.635cm" fo:margin-bottom="0cm" style:contextual-spacing="false" fo:line-height="100%" fo:background-color="#ffffff"/>
    </style:style>
    <style:style style:name="P3"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officeooo:rsid="000eb7a8"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5"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6" style:family="paragraph" style:parent-style-name="Standard">
      <loext:graphic-properties draw:fill="solid" draw:fill-color="#ffffff"/>
      <style:paragraph-properties fo:margin-top="0.423cm" fo:margin-bottom="0cm" style:contextual-spacing="false" fo:line-height="100%" fo:background-color="#ffffff"/>
    </style:style>
    <style:style style:name="P7" style:family="paragraph" style:parent-style-name="Standard">
      <loext:graphic-properties draw:fill="solid" draw:fill-color="#ffffff"/>
      <style:paragraph-properties fo:margin-top="0.423cm" fo:margin-bottom="0cm" style:contextual-spacing="false" fo:line-height="100%" fo:background-color="#ffffff"/>
      <style:text-properties officeooo:rsid="000eb7a8" officeooo:paragraph-rsid="000eb7a8"/>
    </style:style>
    <style:style style:name="P8"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style>
    <style:style style:name="P9" style:family="paragraph" style:parent-style-name="Standard">
      <style:paragraph-properties fo:margin-top="0.635cm" fo:margin-bottom="0.635cm" style:contextual-spacing="false" style:line-height-at-least="0.466cm"/>
    </style:style>
    <style:style style:name="P10" style:family="paragraph" style:parent-style-name="Standard">
      <style:paragraph-properties fo:margin-top="0.635cm" fo:margin-bottom="0.635cm" style:contextual-spacing="false" style:line-height-at-least="0.466cm"/>
      <style:text-properties officeooo:rsid="000eb7a8" officeooo:paragraph-rsid="000eb7a8"/>
    </style:style>
    <style:style style:name="P11" style:family="paragraph" style:parent-style-name="Standard">
      <style:paragraph-properties fo:margin-top="0.635cm" fo:margin-bottom="0.635cm" style:contextual-spacing="false" style:line-height-at-least="0.466cm"/>
      <style:text-properties officeooo:rsid="0013c463" officeooo:paragraph-rsid="0013c463"/>
    </style:style>
    <style:style style:name="P12"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21f39" officeooo:paragraph-rsid="00121f39" style:letter-kerning="false" style:font-name-asian="Times New Roman1" style:font-size-asian="8pt" style:language-asian="en" style:country-asian="GB" style:font-name-complex="Times New Roman1" style:font-size-complex="8pt"/>
    </style:style>
    <style:style style:name="P13"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3c463" officeooo:paragraph-rsid="0013c463" style:letter-kerning="false" style:font-name-asian="Times New Roman1" style:font-size-asian="8pt" style:language-asian="en" style:country-asian="GB" style:font-name-complex="Times New Roman1" style:font-size-complex="8pt"/>
    </style:style>
    <style:style style:name="P14"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42a88" officeooo:paragraph-rsid="00142a88" style:letter-kerning="false" style:font-name-asian="Times New Roman1" style:font-size-asian="8pt" style:language-asian="en" style:country-asian="GB" style:font-name-complex="Times New Roman1" style:font-size-complex="8pt"/>
    </style:style>
    <style:style style:name="P15"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P16"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17"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18"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1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style>
    <style:style style:name="P2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font-weight="normal" officeooo:paragraph-rsid="000eb7a8" style:letter-kerning="false" style:font-name-asian="Times New Roman1" style:font-size-asian="10pt" style:language-asian="en" style:country-asian="GB" style:font-weight-asian="normal" style:font-name-complex="Times New Roman1" style:font-size-complex="10pt" style:font-weight-complex="normal"/>
    </style:style>
    <style:style style:name="P2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2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3"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4" style:family="paragraph" style:parent-style-name="Standard" style:list-style-name="L1">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5" style:family="paragraph" style:parent-style-name="Standard" style:list-style-name="L2">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6" style:family="paragraph" style:parent-style-name="Standard" style:list-style-name="L3">
      <style:paragraph-properties fo:margin-top="0.423cm" fo:margin-bottom="0cm" style:contextual-spacing="false" fo:line-height="100%" fo:text-align="justify" style:justify-single-word="false" loext:word-spacing-minimum="75%" loext:word-spacing-maximum="133%"/>
    </style:style>
    <style:style style:name="P27"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29"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30"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3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rsid="000eb7a8" officeooo:paragraph-rsid="000eb7a8" style:letter-kerning="false" style:font-name-asian="Times New Roman1" style:font-size-asian="10pt" style:language-asian="en" style:country-asian="GB" style:font-name-complex="Times New Roman1" style:font-size-complex="10pt"/>
    </style:style>
    <style:style style:name="P32" style:family="paragraph" style:parent-style-name="Text_20_body" style:list-style-name="List_20_1">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33" style:family="paragraph" style:parent-style-name="Text_20_body" style:list-style-name="List_20_1">
      <style:paragraph-properties fo:margin-top="0.423cm" fo:margin-bottom="0cm" style:contextual-spacing="false" fo:line-height="100%" fo:text-align="justify" style:justify-single-word="false" fo:orphans="2" fo:widows="2" style:writing-mode="lr-tb" loext:word-spacing-minimum="75%" loext:word-spacing-maximum="133%"/>
      <style:text-properties officeooo:paragraph-rsid="000eb7a8"/>
    </style:style>
    <style:style style:name="P34"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ff" loext:opacity="100%" style:font-name="Times New Roman" fo:font-size="10pt" officeooo:paragraph-rsid="00192b7c" style:letter-kerning="false" style:font-name-asian="Times New Roman1" style:font-size-asian="10pt" style:language-asian="en" style:country-asian="GB" style:font-name-complex="Times New Roman1" style:font-size-complex="10pt"/>
    </style:style>
    <style:style style:name="P35" style:family="paragraph" style:parent-style-name="Text_20_body">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36" style:family="paragraph" style:parent-style-name="Text_20_body" style:list-style-name="L4">
      <loext:graphic-properties draw:fill="solid" draw:fill-color="#ffffff"/>
      <style:paragraph-properties fo:margin-left="0cm" fo:margin-right="0cm" fo:margin-top="0.423cm" fo:margin-bottom="0.499cm" style:contextual-spacing="false" fo:line-height="100%" fo:text-align="justify" style:justify-single-word="false" fo:text-indent="0cm" style:auto-text-indent="false" fo:background-color="#ffffff" loext:word-spacing-minimum="75%" loext:word-spacing-maximum="133%"/>
    </style:style>
    <style:style style:name="P37"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6pt" fo:font-weight="normal" style:letter-kerning="false" style:font-name-asian="Times New Roman1" style:font-size-asian="6pt" style:language-asian="en" style:country-asian="GB" style:font-weight-asian="normal" style:font-name-complex="Times New Roman1" style:font-size-complex="6pt" style:font-weight-complex="normal"/>
    </style:style>
    <style:style style:name="P38"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9" style:family="paragraph" style:parent-style-name="Standard">
      <style:paragraph-properties fo:margin-top="0.423cm" fo:margin-bottom="0cm" style:contextual-spacing="false" fo:line-height="100%" fo:text-align="justify" style:justify-single-word="false" loext:word-spacing-minimum="75%" loext:word-spacing-maximum="133%"/>
    </style:style>
    <style:style style:name="P40"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41" style:family="paragraph" style:parent-style-name="Standard" style:list-style-name="L5">
      <style:paragraph-properties fo:margin-top="0.423cm" fo:margin-bottom="0cm" style:contextual-spacing="false" fo:line-height="100%" fo:text-align="justify" style:justify-single-word="false" loext:word-spacing-minimum="75%" loext:word-spacing-maximum="133%"/>
    </style:style>
    <style:style style:name="P42" style:family="paragraph" style:parent-style-name="Standard" style:list-style-name="L5">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43" style:family="paragraph" style:parent-style-name="Text_20_body">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4" style:family="paragraph" style:parent-style-name="Text_20_body">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5" style:family="paragraph" style:parent-style-name="Text_20_body">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6" style:family="paragraph" style:parent-style-name="Text_20_body" style:list-style-name="L6">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7" style:family="paragraph" style:parent-style-name="Text_20_body" style:list-style-name="L6">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8" style:family="paragraph" style:parent-style-name="Text_20_body" style:list-style-name="L7">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9" style:family="paragraph" style:parent-style-name="Text_20_body" style:list-style-name="L7">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50" style:family="paragraph" style:parent-style-name="Text_20_body" style:list-style-name="L7">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51" style:family="paragraph" style:parent-style-name="Text_20_body" style:list-style-name="L8">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52" style:family="paragraph" style:parent-style-name="Text_20_body" style:list-style-name="L8">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53" style:family="paragraph" style:parent-style-name="Text_20_body" style:list-style-name="L8">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54" style:family="paragraph" style:parent-style-name="Text_20_body" style:list-style-name="L9">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55" style:family="paragraph" style:parent-style-name="Text_20_body" style:list-style-name="L9">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5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57" style:family="paragraph" style:parent-style-name="Standard">
      <style:text-properties style:font-name="Times New Roman" fo:font-size="9pt" style:font-size-asian="9pt" style:font-name-complex="Times New Roman1" style:font-size-complex="9pt"/>
    </style:style>
    <style:style style:name="T1" style:family="text">
      <style:text-properties fo:color="#373d3f" loext:opacity="100%" style:font-name="Times New Roman" fo:font-size="24pt" style:letter-kerning="true" style:font-name-asian="Times New Roman1" style:font-size-asian="24pt" style:language-asian="en" style:country-asian="GB" style:font-name-complex="Times New Roman1" style:font-size-complex="24pt"/>
    </style:style>
    <style:style style:name="T2" style:family="text">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T3" style:family="text">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4" style:family="text">
      <style:text-properties fo:color="#373d3f" loext:opacity="100%" style:font-name="Times New Roman" fo:font-size="10pt" fo:font-weight="bold" officeooo: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T5" style:family="text">
      <style:text-properties fo:color="#0000f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6" style:family="text">
      <style:text-properties fo:color="#0000ff" loext:opacity="100%" style:font-name="Times New Roman" fo:font-size="10pt" fo:font-weight="bold" officeooo:rsid="00121f39" style:letter-kerning="false" style:font-name-asian="Times New Roman1" style:font-size-asian="10pt" style:language-asian="en" style:country-asian="GB" style:font-weight-asian="bold" style:font-name-complex="Times New Roman1" style:font-size-complex="10pt" style:font-weight-complex="bold"/>
    </style:style>
    <style:style style:name="T7" style:family="text">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T8" style:family="text">
      <style:text-properties fo:color="#373d3f" loext:opacity="100%" style:font-name="Times New Roman" fo:font-size="8pt" style:letter-kerning="false" style:font-name-asian="Times New Roman1" style:font-size-asian="8pt" style:language-asian="en" style:country-asian="GB" style:font-name-complex="Times New Roman1" style:font-size-complex="8pt"/>
    </style:style>
    <style:style style:name="T9" style:family="text">
      <style:text-properties fo:color="#0000ff" loext:opacity="100%" style:font-name="Times New Roman" fo:font-size="8pt" style:letter-kerning="false" style:font-name-asian="Times New Roman1" style:font-size-asian="8pt" style:language-asian="en" style:country-asian="GB" style:font-name-complex="Times New Roman1" style:font-size-complex="8pt"/>
    </style:style>
    <style:style style:name="T10" style:family="text">
      <style:text-properties fo:color="#0000ff" loext:opacity="100%" style:font-name="Times New Roman" fo:font-size="8pt" officeooo:rsid="00121f39" style:letter-kerning="false" style:font-name-asian="Times New Roman1" style:font-size-asian="8pt" style:language-asian="en" style:country-asian="GB" style:font-name-complex="Times New Roman1" style:font-size-complex="8pt"/>
    </style:style>
    <style:style style:name="T11" style:family="text">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T12" style:family="text">
      <style:text-properties fo:font-weight="bold"/>
    </style:style>
    <style:style style:name="T13" style:family="text">
      <style:text-properties fo:color="#000000" loext:opacity="100%" style:font-name="Times New Roman" fo:font-size="10pt" fo:font-weight="bold" style:letter-kerning="false" style:font-name-asian="Times New Roman1" style:font-size-asian="10pt" style:language-asian="en" style:country-asian="GB" style:font-name-complex="Times New Roman1" style:font-size-complex="10pt"/>
    </style:style>
    <style:style style:name="T14" style:family="text">
      <style:text-properties fo:color="#000000"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15" style:family="text">
      <style:text-properties fo:color="#000000" loext:opacity="100%"/>
    </style:style>
    <style:style style:name="T16" style:family="text">
      <style:text-properties fo:color="#373d3f" loext:opacity="100%" style:font-name="Times New Roman" fo:font-size="10pt" fo:font-weight="bold" style:letter-kerning="false" style:font-name-asian="Times New Roman1" style:font-size-asian="10pt" style:language-asian="en" style:country-asian="GB" style:font-name-complex="Times New Roman1" style:font-size-complex="10pt"/>
    </style:style>
    <style:style style:name="T17" style:family="text">
      <style:text-properties fo:font-size="6pt" fo:font-weight="normal" style:font-size-asian="6pt" style:font-weight-asian="normal" style:font-size-complex="6pt" style:font-weight-complex="normal"/>
    </style:style>
    <style:style style:name="T18" style:family="text">
      <style:text-properties style:font-name="Google Sans Text" fo:font-weight="normal" style:font-weight-asian="normal" style:font-weight-complex="normal"/>
    </style:style>
    <style:style style:name="T19" style:family="text">
      <style:text-properties officeooo:rsid="0015f561"/>
    </style:style>
    <style:style style:name="T20" style:family="text">
      <style:text-properties officeooo:rsid="0017be55"/>
    </style:style>
    <style:style style:name="T21" style:family="text">
      <style:text-properties style:font-name="Times New Roman" fo:font-size="9pt" style:font-size-asian="9pt" style:font-name-complex="Times New Roman1"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Appendix C: IEEE 830 Template</text:span><text:span text:style-name="T1"/></text:h>
      <text:p text:style-name="P2" loext:marker-style-name="T2"><text:span text:style-name="T3">Software Requirements Specification</text:span><text:span text:style-name="T3"/></text:p>
      <text:p text:style-name="P3" loext:marker-style-name="T2">for</text:p>
      <text:p text:style-name="P4" loext:marker-style-name="T2">CLI python backend</text:p>
      <text:p text:style-name="P5" loext:marker-style-name="T2"/>
      <text:p text:style-name="P6" loext:marker-style-name="T2"><text:span text:style-name="T3">Version </text:span><text:span text:style-name="T4">1</text:span></text:p>
      <text:p text:style-name="P6" loext:marker-style-name="T2"><text:span text:style-name="T3">Prepared by </text:span><text:span text:style-name="T4">M</text:span><text:span text:style-name="T4">a</text:span><text:span text:style-name="T4">c</text:span><text:span text:style-name="T4">i</text:span><text:span text:style-name="T4">e</text:span><text:span text:style-name="T4">j </text:span><text:span text:style-name="T4">G</text:span><text:span text:style-name="T4">i</text:span><text:span text:style-name="T4">e</text:span><text:span text:style-name="T4">r</text:span><text:span text:style-name="T4">m</text:span><text:span text:style-name="T4">a</text:span><text:span text:style-name="T4">l</text:span><text:span text:style-name="T4">a</text:span></text:p>
      <text:p text:style-name="P7" loext:marker-style-name="T2"><text:span text:style-name="T5">T</text:span><text:span text:style-name="T5">U</text:span><text:span text:style-name="T5">L</text:span></text:p>
      <text:p text:style-name="P7" loext:marker-style-name="T2"><text:span text:style-name="T5">1</text:span><text:span text:style-name="T6">1</text:span><text:span text:style-name="T5">.</text:span><text:span text:style-name="T5">0</text:span><text:span text:style-name="T5">3</text:span></text:p>
      <text:p text:style-name="P5" loext:marker-style-name="T2"/>
      <text:p text:style-name="P8" loext:marker-style-name="T2"><text:span text:style-name="T3">Table of Contents</text:span><text:span text:style-name="T3"/></text:p>
      <text:p text:style-name="P6" loext:marker-style-name="T2"><text:span text:style-name="T7"/></text:p>
      <text:p text:style-name="P8" loext:marker-style-name="T2"><text:span text:style-name="T3">Revision History</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 loext:marker-style-name="T8"><text:span text:style-name="T8">Name</text:span><text:span text:style-name="T8"/></text:p>
          </table:table-cell>
          <table:table-cell table:style-name="Table1.A1" office:value-type="string">
            <text:p text:style-name="P9" loext:marker-style-name="T8"><text:span text:style-name="T8">Date</text:span><text:span text:style-name="T8"/></text:p>
          </table:table-cell>
          <table:table-cell table:style-name="Table1.A1" office:value-type="string">
            <text:p text:style-name="P9" loext:marker-style-name="T8"><text:span text:style-name="T8">Reason for Changes</text:span><text:span text:style-name="T8"/></text:p>
          </table:table-cell>
          <table:table-cell table:style-name="Table1.A1" office:value-type="string">
            <text:p text:style-name="P9" loext:marker-style-name="T8"><text:span text:style-name="T8">Version</text:span><text:span text:style-name="T8"/></text:p>
          </table:table-cell>
        </table:table-row>
        <table:table-row table:style-name="Table1.1">
          <table:table-cell table:style-name="Table1.A1" office:value-type="string">
            <text:p text:style-name="P10" loext:marker-style-name="T8"><text:span text:style-name="T9">Maciej</text:span></text:p>
          </table:table-cell>
          <table:table-cell table:style-name="Table1.A1" office:value-type="string">
            <text:p text:style-name="P10" loext:marker-style-name="T8"><text:span text:style-name="T9">1</text:span><text:span text:style-name="T10">1</text:span><text:span text:style-name="T9">.03</text:span></text:p>
          </table:table-cell>
          <table:table-cell table:style-name="Table1.A1" office:value-type="string">
            <text:p text:style-name="P11" loext:marker-style-name="T8"><text:span text:style-name="T8">Initial version</text:span></text:p>
          </table:table-cell>
          <table:table-cell table:style-name="Table1.A1" office:value-type="string">
            <text:p text:style-name="P10" loext:marker-style-name="T8"><text:span text:style-name="T9">1</text:span></text:p>
          </table:table-cell>
        </table:table-row>
        <table:table-row table:style-name="Table1.1">
          <table:table-cell table:style-name="Table1.A3" office:value-type="string">
            <text:p text:style-name="P12" loext:marker-style-name="T8">Maciej</text:p>
          </table:table-cell>
          <table:table-cell table:style-name="Table1.A3" office:value-type="string">
            <text:p text:style-name="P13" loext:marker-style-name="T8">18.03</text:p>
          </table:table-cell>
          <table:table-cell table:style-name="Table1.A3" office:value-type="string">
            <text:p text:style-name="P14" loext:marker-style-name="T8">Added the UCD and System Features</text:p>
          </table:table-cell>
          <table:table-cell table:style-name="Table1.A3" office:value-type="string">
            <text:p text:style-name="P14" loext:marker-style-name="T8">2</text:p>
          </table:table-cell>
        </table:table-row>
        <table:table-row table:style-name="Table1.1">
          <table:table-cell table:style-name="Table1.A3" office:value-type="string">
            <text:p text:style-name="P12" loext:marker-style-name="T8"/>
          </table:table-cell>
          <table:table-cell table:style-name="Table1.A3" office:value-type="string">
            <text:p text:style-name="P13" loext:marker-style-name="T8"/>
          </table:table-cell>
          <table:table-cell table:style-name="Table1.A3" office:value-type="string">
            <text:p text:style-name="P14" loext:marker-style-name="T8"/>
          </table:table-cell>
          <table:table-cell table:style-name="Table1.A3" office:value-type="string">
            <text:p text:style-name="P14" loext:marker-style-name="T8"/>
          </table:table-cell>
        </table:table-row>
      </table:table>
      <text:p text:style-name="P15" loext:marker-style-name="T2"/>
      <text:p text:style-name="P15" loext:marker-style-name="T2"/>
      <text:p text:style-name="P15" loext:marker-style-name="T2"/>
      <text:p text:style-name="P15" loext:marker-style-name="T2"/>
      <text:p text:style-name="P15" loext:marker-style-name="T2"><text:soft-page-break/></text:p>
      <text:p text:style-name="P15" loext:marker-style-name="T2"/>
      <text:p text:style-name="P6" loext:marker-style-name="T2"><text:span text:style-name="T3">1. Introduction</text:span><text:span text:style-name="T3"/></text:p>
      <text:p text:style-name="P6" loext:marker-style-name="T2"><text:span text:style-name="T3">1.1. Purpose  </text:span></text:p>
      <text:p text:style-name="P16">This document specifies the software requirements for the Logic Circuit Simulator v1.0. The product is a command-line interface (CLI) application that allows users to build, evaluate, and persist digital logic circuits. The scope includes defining logical inputs, connecting standard logic gates (AND, OR, NOT, NAND, NOR, XOR), generating truth tables, and saving/loading circuit states to JSON files.</text:p>
      <text:p text:style-name="P17">1.2. Document Conventions  </text:p>
      <text:p text:style-name="P18">This document follows the IEEE 830 Software Requirements Specification standard. Requirements are written as atomic, verifiable statements. Functional requirements use the prefix FR-x, and non-functional requirements use NFR-x. The keyword "shall" indicates mandatory system behavior.</text:p>
      <text:p text:style-name="P19" loext:marker-style-name="T2"><text:span text:style-name="T3">1.3. Intended Audience and Reading Suggestions  </text:span></text:p>
      <text:p text:style-name="P20">The intended audience includes developers (engaged in pair-programming/ping-pong development), software testers, and students learning digital logic. It is recommended to read the Overall Description first to understand the CLI flow, followed by System Features for exact command specifications.</text:p>
      <text:p text:style-name="P21" loext:marker-style-name="T2">1.4. Product Scope  </text:p>
      <text:p text:style-name="P22">The Logic Circuit Simulator provides a lightweight, fast backend for defining Boolean logic systems. It aims to eliminate manual truth table calculations by automatically evaluating complex, multi-gate circuits and detecting logical errors (e.g., cyclic dependencies).</text:p>
      <text:p text:style-name="P19" loext:marker-style-name="T2"><text:span text:style-name="T3">1.5. References  </text:span></text:p>
      <text:p text:style-name="P23"><text:bookmark text:name="p-rc_cd709a801664aac2-99"/>IEEE Std 830-1998, IEEE Recommended Practice for Software Requirements Specifications. </text:p>
      <text:list text:style-name="L1">
        <text:list-item>
          <text:p text:style-name="P24"><text:bookmark text:name="p-rc_cd709a801664aac2-100"/>"Software Engineering Lab 6: Test-Driven Development (TDD)", TUL, dr inż. Abdulla Juwaied. </text:p>
        </text:list-item>
      </text:list>
      <text:list text:style-name="L2">
        <text:list-item>
          <text:p text:style-name="P25"><text:bookmark text:name="p-rc_cd709a801664aac2-101"/>"Software Engineering Lab 5: Git and GitHub", TUL, dr inż. Abdulla Juwaied. </text:p>
        </text:list-item>
      </text:list>
      <text:list text:style-name="L3">
        <text:list-item>
          <text:p text:style-name="P26"><text:bookmark text:name="p-rc_cd709a801664aac2-102"/><text:span text:style-name="T11">Project Source Code: </text:span><text:span text:style-name="Source_20_Text"><text:span text:style-name="T11">main.py</text:span></text:span><text:span text:style-name="T11"> and </text:span><text:span text:style-name="Source_20_Text"><text:span text:style-name="T11">circuit.py</text:span></text:span><text:span text:style-name="T11"> developed via Ping-Pong Pair Programming.</text:span></text:p>
        </text:list-item>
      </text:list>
      <text:p text:style-name="P23"/>
      <text:p text:style-name="P19" loext:marker-style-name="T2"><text:span text:style-name="T3">2. Overall Description</text:span><text:span text:style-name="T3"/></text:p>
      <text:p text:style-name="P19" loext:marker-style-name="T2"><text:span text:style-name="T3">2.1. Product Perspective  </text:span><text:span text:style-name="T3"/></text:p>
      <text:p text:style-name="P27" loext:marker-style-name="T2">The system is a standalone Python CLI application. It does not require a graphical user interface and operates entirely through terminal commands, making it ideal as a backend logic engine or an educational tool.</text:p>
      <text:p text:style-name="P28" loext:marker-style-name="T2"><draw:frame draw:style-name="fr1" draw:name="Image1" text:anchor-type="char" svg:x="9.659cm" svg:y="0.513cm" svg:width="6.733cm" svg:height="4.613cm" draw:z-index="0"><draw:image xlink:href="Pictures/1000000100000B47000009FA584CE4AD.png" xlink:type="simple" xlink:show="embed" xlink:actuate="onLoad" draw:mime-type="image/png"/></draw:frame></text:p>
      <text:p text:style-name="P28" loext:marker-style-name="T2"/>
      <text:p text:style-name="P28" loext:marker-style-name="T2"/>
      <text:p text:style-name="P28" loext:marker-style-name="T2"><text:soft-page-break/></text:p>
      <text:p text:style-name="P28" loext:marker-style-name="T2">2.2. Product Features  <text:span text:style-name="T2"/></text:p>
      <text:list text:style-name="List_20_1">
        <text:list-item>
          <text:p text:style-name="P29"><text:bookmark text:name="p-rc_db68043546fb8a07-101"/>Circuit Construction: Users can dynamically add named inputs and logic gates (AND, OR, NOT, NAND, NOR, XOR). </text:p>
        </text:list-item>
        <text:list-item>
          <text:p text:style-name="P29"><text:bookmark text:name="p-rc_db68043546fb8a07-102"/>State Evaluation: The system computes the output of the circuit based on provided input states using topological sorting. </text:p>
        </text:list-item>
        <text:list-item>
          <text:p text:style-name="P29"><text:bookmark text:name="p-rc_db68043546fb8a07-103"/>Truth Table Generation: The application automatically generates full truth tables for all possible input combinations. </text:p>
        </text:list-item>
        <text:list-item>
          <text:p text:style-name="P29"><text:bookmark text:name="p-rc_db68043546fb8a07-104"/>State Persistence: Circuits can be serialized to and deserialized from JSON files (Save/Load). </text:p>
        </text:list-item>
        <text:list-item>
          <text:p text:style-name="P30"><text:bookmark text:name="p-rc_db68043546fb8a07-105"/>Safety Checks: Automatic detection of cyclic dependencies to prevent infinite evaluation loops. </text:p>
        </text:list-item>
      </text:list>
      <text:p text:style-name="P31"/>
      <text:p text:style-name="P2" loext:marker-style-name="T2"><text:span text:style-name="T3">2.3. User Classes and Characteristics  </text:span><text:span text:style-name="T3"/></text:p>
      <text:list text:continue-numbering="true" text:style-name="List_20_1">
        <text:list-item>
          <text:p text:style-name="P32"><text:span text:style-name="T12">Students/Engineers:</text:span> Primary users who interact with the CLI to test logical expressions. They require clear error messages and intuitive command syntax.</text:p>
        </text:list-item>
        <text:list-item>
          <text:p text:style-name="P33"><text:bookmark text:name="p-rc_db68043546fb8a07-106"/><text:span text:style-name="T13">Developers:</text:span><text:span text:style-name="T11"> Users extending the code. Because the project is built using Test-Driven Development (Ping-Pong method), the codebase is heavily modularized (separated into </text:span><text:span text:style-name="Source_20_Text"><text:span text:style-name="T11">main.py</text:span></text:span><text:span text:style-name="T11"> and </text:span><text:span text:style-name="Source_20_Text"><text:span text:style-name="T11">circuit.py</text:span></text:span><text:span text:style-name="T11">) to facilitate easy testing.</text:span></text:p>
        </text:list-item>
      </text:list>
      <text:p text:style-name="P22"/>
      <text:p text:style-name="P19" loext:marker-style-name="T2"><text:span text:style-name="T3">2.4. Operating Environment</text:span><text:span text:style-name="T3"/></text:p>
      <text:p text:style-name="P19"><text:span text:style-name="T11">The software operates on any operating system (Windows, macOS, Linux) that supports Python 3. No external third-party libraries are required, as it relies on standard Python modules (e.g., </text:span><text:span text:style-name="Source_20_Text"><text:span text:style-name="T11">json</text:span></text:span><text:span text:style-name="T11">, </text:span><text:span text:style-name="Source_20_Text"><text:span text:style-name="T11">enum</text:span></text:span><text:span text:style-name="T11">, </text:span><text:span text:style-name="Source_20_Text"><text:span text:style-name="T11">itertools</text:span></text:span><text:span text:style-name="T11">).</text:span></text:p>
      <text:p text:style-name="P19" loext:marker-style-name="T2"><text:span text:style-name="T3">2.5. Design and Implementation Constraints</text:span><text:span text:style-name="T3"/></text:p>
      <text:p text:style-name="P22">The system is constrained to a text-based interface. The evaluation algorithm must prevent infinite loops by detecting cycles before calculating outputs. Furthermore, the development process follows the strict Ping-Pong TDD methodology, meaning all features must be verifiable via automated tests before implementation.</text:p>
      <text:p text:style-name="P19" loext:marker-style-name="T2"><text:span text:style-name="T3">2.6. User Documentation</text:span><text:span text:style-name="T14"/></text:p>
      <text:p text:style-name="P34"><text:span text:style-name="T15">As the system is a command-line application distributed via GitHub, the primary user documentation will be provided as a </text:span><text:span text:style-name="Source_20_Text"><text:span text:style-name="T15">README.md</text:span></text:span><text:span text:style-name="T15"> file within the repository. The system also includes an internal </text:span><text:span text:style-name="Source_20_Text"><text:span text:style-name="T15">help</text:span></text:span><text:span text:style-name="T15"> command that prints all available commands, usage examples, and syntax rules directly to the terminal</text:span></text:p>
      <text:p text:style-name="P19" loext:marker-style-name="T2"><text:span text:style-name="T3">2.7. Assumptions and Dependencies</text:span><text:span text:style-name="T3"/></text:p>
      <text:p text:style-name="P35" loext:marker-style-name="T2">It is assumed that the user operates in a terminal environment capable of standard standard input/output (stdin/stdout). The development follows strict Test-Driven Development (TDD) principles, requiring all new features to be covered by unit tests before implementation.</text:p>
      <text:list text:style-name="L4">
        <text:list-item>
          <text:p text:style-name="P36"><text:bookmark text:name="p-rc_cd709a801664aac2-105"/><text:span text:style-name="T16">Dependencies:</text:span><text:span text:style-name="T2"> The software is written in pure Python. It relies strictly on the Python Standard Library </text:span><text:span text:style-name="T2">(e.g., </text:span><text:span text:style-name="Source_20_Text"><text:span text:style-name="T2">json</text:span></text:span><text:span text:style-name="T2">, </text:span><text:span text:style-name="Source_20_Text"><text:span text:style-name="T2">enum</text:span></text:span><text:span text:style-name="T2">, </text:span><text:span text:style-name="Source_20_Text"><text:span text:style-name="T2">itertools</text:span></text:span><text:span text:style-name="T2">)</text:span><text:span text:style-name="T2"> and requires Python 3.x to execute. No third-party frameworks or external databases are required.</text:span></text:p>
        </text:list-item>
      </text:list>
      <text:p text:style-name="P27" loext:marker-style-name="T2"/>
      <text:p text:style-name="P28" loext:marker-style-name="T2"><text:soft-page-break/>3. System Features</text:p>
      <text:p text:style-name="P37"/>
      <text:p text:style-name="P37"><draw:frame draw:style-name="fr1" draw:name="Image2" text:anchor-type="char" svg:x="-0.129cm" svg:y="0.231cm" svg:width="5.808cm" svg:height="9.252cm" draw:z-index="1"><draw:image xlink:href="Pictures/1000000100000A3F00001052A54C6E1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pan text:style-name="T17">UML Class Diagram. It illustrates the core architecture of the Logic Circuit Simulator. The diagram highlights the composition relationship where the </text:span><text:span text:style-name="Source_20_Text"><text:span text:style-name="T17">Circuit</text:span></text:span><text:span text:style-name="T17"> class manages multiple </text:span><text:span text:style-name="Source_20_Text"><text:span text:style-name="T17">Gate</text:span></text:span><text:span text:style-name="T17"> instances, and the association between each </text:span><text:span text:style-name="Source_20_Text"><text:span text:style-name="T17">Gate</text:span></text:span><text:span text:style-name="T17"> and its respective </text:span><text:span text:style-name="Source_20_Text"><text:span text:style-name="T17">GateType</text:span></text:span><text:span text:style-name="T17"> enumeration. It also details the main attributes and methods responsible for circuit evaluation and persistence.</text:span></text:p>
      <text:p text:style-name="P38">3.1. Circuit Construction</text:p>
      <text:p text:style-name="P23"><text:s/>Allows users to define logic gates and inputs dynamically. </text:p>
      <text:p text:style-name="P38">3.2. Circuit Evaluation &amp; Truth Tables </text:p>
      <text:p text:style-name="P23">Calculates outputs and generates full truth tables while detecting cyclic dependencies. </text:p>
      <text:p text:style-name="P38">3.3. State Persistence </text:p>
      <text:p text:style-name="P23">Allows saving and loading the circuit configuration via JSON files.4. External Interface Requirements</text:p>
      <text:p text:style-name="P39">4.1. User Interfaces Overview</text:p>
      <text:p text:style-name="P19" loext:marker-style-name="T2"><draw:frame draw:style-name="fr2" draw:name="Image3" text:anchor-type="char" svg:width="15.921cm" svg:height="11.037cm" draw:z-index="2"><draw:image xlink:href="Pictures/100000010000170C00000FFAAB85D632.png" xlink:type="simple" xlink:show="embed" xlink:actuate="onLoad" draw:mime-type="image/png"/></draw:frame><text:soft-page-break/><text:span text:style-name="T2"/></text:p>
      <text:p text:style-name="P19" loext:marker-style-name="T2"><text:span text:style-name="T3">4.2. Hardware Interfaces</text:span><text:span text:style-name="T3"/></text:p>
      <text:p text:style-name="P27" loext:marker-style-name="T2">The system does not require any specialized hardware interfaces. It operates on standard computing devices (desktop computers, laptops) equipped with standard input/output peripherals (keyboard for typing commands and a monitor for viewing terminal output).</text:p>
      <text:p text:style-name="P19" loext:marker-style-name="T2"><text:span text:style-name="T3">4.3. Software Interfaces</text:span><text:span text:style-name="T3"/></text:p>
      <text:p text:style-name="P40"><text:bookmark text:name="p-rc_cf8d412271f8fbc4-118"/>The application is a standalone Python script and requires the Python 3.x runtime environment to execute. It interacts with the host operating system's file system to perform state persistence. Specifically: </text:p>
      <text:list text:style-name="L5">
        <text:list-item>
          <text:p text:style-name="P41"><text:bookmark text:name="p-rc_cf8d412271f8fbc4-119"/><text:span text:style-name="T2">File I/O: The system reads from and writes to </text:span><text:span text:style-name="Source_20_Text"><text:span text:style-name="T2">.json</text:span></text:span><text:span text:style-name="T2"> files on the local disk using Python's standard </text:span><text:span text:style-name="Source_20_Text"><text:span text:style-name="T2">json</text:span></text:span><text:span text:style-name="T2"> library when the </text:span><text:span text:style-name="Source_20_Text"><text:span text:style-name="T2">load</text:span></text:span><text:span text:style-name="T2"> and </text:span><text:span text:style-name="Source_20_Text"><text:span text:style-name="T2">save</text:span></text:span><text:span text:style-name="T2"> commands are executed. </text:span></text:p>
        </text:list-item>
        <text:list-item>
          <text:p text:style-name="P42"><text:bookmark text:name="p-rc_cf8d412271f8fbc4-120"/>Data Format: The shared data format for persistence is strictly JSON, containing serialized lists of inputs and dictionaries of gate definitions and wiring connections. </text:p>
        </text:list-item>
      </text:list>
      <text:p text:style-name="P40"/>
      <text:p text:style-name="P43" loext:marker-style-name="T2">5. System Features/Modules</text:p>
      <text:p text:style-name="P44">5.1. Circuit Construction</text:p>
      <text:p text:style-name="P44">5.1.1 Description and Priority</text:p>
      <text:p text:style-name="P45">Adding inputs and standard logic gates to build a circuit. Priority: High.</text:p>
      <text:p text:style-name="P44">5.1.2 Stimulus/Response Sequences</text:p>
      <text:list text:style-name="L6">
        <text:list-item>
          <text:p text:style-name="P46"><text:span text:style-name="T18">User enters </text:span><text:span text:style-name="Source_20_Text"><text:span text:style-name="T18">input A</text:span></text:span><text:span text:style-name="T18"> -&gt; System registers a new input node 'A'.</text:span></text:p>
        </text:list-item>
        <text:list-item>
          <text:p text:style-name="P46"><text:soft-page-break/><text:span text:style-name="T18">User enters </text:span><text:span text:style-name="Source_20_Text"><text:span text:style-name="T18">gate g1 AND A B</text:span></text:span><text:span text:style-name="T18"> -&gt; System registers an AND gate named 'g1' connected to inputs 'A' and 'B'.</text:span></text:p>
          <text:p text:style-name="P47">5.1.3 Functional Requirements</text:p>
        </text:list-item>
        <text:list-item>
          <text:p text:style-name="P47">FR-1.1: The system shall allow users to add boolean inputs by specifying a unique name.</text:p>
        </text:list-item>
        <text:list-item>
          <text:p text:style-name="P47">FR-1.2: The system shall allow users to add logic gates of types: AND, OR, NOT, NAND, NOR, XOR.</text:p>
        </text:list-item>
        <text:list-item>
          <text:p text:style-name="P47">FR-1.3: The system shall map gate inputs to previously defined input nodes or other gate outputs.</text:p>
        </text:list-item>
      </text:list>
      <text:p text:style-name="P44">5.2. Circuit Evaluation &amp; Truth Tables</text:p>
      <text:p text:style-name="P44">5.2.1 Description and Priority</text:p>
      <text:p text:style-name="P45">Evaluating the logic states and preventing infinite loops. Priority: High.</text:p>
      <text:p text:style-name="P44">5.2.2 Stimulus/Response Sequences</text:p>
      <text:list text:style-name="L7">
        <text:list-item>
          <text:p text:style-name="P48"><text:span text:style-name="T18">User enters </text:span><text:span text:style-name="Source_20_Text"><text:span text:style-name="T18">eval A=1 B=0</text:span></text:span><text:span text:style-name="T18"> -&gt; System evaluates the logic path and prints the result for all gates.</text:span></text:p>
        </text:list-item>
        <text:list-item>
          <text:p text:style-name="P48"><text:span text:style-name="T18">User enters </text:span><text:span text:style-name="Source_20_Text"><text:span text:style-name="T18">table</text:span></text:span><text:span text:style-name="T18"> -&gt; System generates a truth table for all possible input combinations.</text:span></text:p>
          <text:p text:style-name="P49">5.2.3 Functional Requirements</text:p>
        </text:list-item>
        <text:list-item>
          <text:p text:style-name="P50">FR-2.1: The system shall dynamically compute the boolean output of all gates based on provided input values.</text:p>
        </text:list-item>
        <text:list-item>
          <text:p text:style-name="P50">FR-2.2: The system shall generate a topological execution order to ensure gates are evaluated only after their dependencies are resolved.</text:p>
        </text:list-item>
        <text:list-item>
          <text:p text:style-name="P48"><text:span text:style-name="T18">FR-2.3: The system shall detect cyclic dependencies (e.g., gate A depends on gate B, which depends on gate A) and throw a </text:span><text:span text:style-name="Source_20_Text"><text:span text:style-name="T18">ValueError</text:span></text:span><text:span text:style-name="T18"> before evaluation.</text:span></text:p>
        </text:list-item>
        <text:list-item>
          <text:p text:style-name="P50">FR-2.4: The system shall generate a full truth table encompassing <text:span text:style-name="T19">2^n</text:span> combinations, where <text:span text:style-name="T19">n</text:span> is the number of inputs.</text:p>
          <text:p text:style-name="P50"><draw:frame draw:style-name="fr3" draw:name="Image4" text:anchor-type="char" svg:width="15.169cm" svg:height="8.408cm" draw:z-index="3"><draw:image xlink:href="Pictures/1000000100000FAC000008B03BCFC06C.png" xlink:type="simple" xlink:show="embed" xlink:actuate="onLoad" draw:mime-type="image/png"/></draw:frame><text:soft-page-break/></text:p>
        </text:list-item>
      </text:list>
      <text:p text:style-name="P44">5.3. State Persistence</text:p>
      <text:p text:style-name="P44">5.3.1 Description and Priority</text:p>
      <text:p text:style-name="P45">Saving and loading circuit state using JSON. Priority: Medium.</text:p>
      <text:p text:style-name="P44">5.3.2 Stimulus/Response Sequences</text:p>
      <text:list text:style-name="L8">
        <text:list-item>
          <text:p text:style-name="P51"><text:span text:style-name="T18">User enters </text:span><text:span text:style-name="Source_20_Text"><text:span text:style-name="T18">save my_circuit.json</text:span></text:span><text:span text:style-name="T18"> -&gt; System serializes the current circuit to the file.</text:span></text:p>
        </text:list-item>
        <text:list-item>
          <text:p text:style-name="P51"><text:span text:style-name="T18">User enters </text:span><text:span text:style-name="Source_20_Text"><text:span text:style-name="T18">load my_circuit.json</text:span></text:span><text:span text:style-name="T18"> -&gt; System reconstructs the circuit from the file.</text:span></text:p>
          <text:p text:style-name="P52">5.3.3 Functional Requirements</text:p>
        </text:list-item>
        <text:list-item>
          <text:p text:style-name="P53">FR-3.1: The system shall serialize the current inputs, gate types, and wiring connections to a JSON format.</text:p>
        </text:list-item>
        <text:list-item>
          <text:p text:style-name="P53">FR-3.2: The system shall clear the current state and instantiate a new circuit model upon loading a valid JSON file.</text:p>
        </text:list-item>
      </text:list>
      <text:p text:style-name="P28" loext:marker-style-name="T2"><text:span text:style-name="T3"/></text:p>
      <text:p text:style-name="P43" loext:marker-style-name="T2">6. Nonfunctional Requirements</text:p>
      <text:p text:style-name="P44">6.1. Performance</text:p>
      <text:list text:style-name="L9">
        <text:list-item>
          <text:p text:style-name="P54">NFR-1.1: The system shall evaluate a circuit with up to 20 inputs within 1 second.</text:p>
        </text:list-item>
        <text:list-item>
          <text:p text:style-name="P54">NFR-1.2: The cycle detection algorithm (topological sort) shall execute in O(V + E) time complexity, where <text:span text:style-name="T20">V</text:span> is the number of gates/inputs and <text:span text:style-name="T20">E</text:span> is the number of wire connections.</text:p>
          <text:p text:style-name="P55">6.2. Usability</text:p>
        </text:list-item>
        <text:list-item>
          <text:p text:style-name="P54">NFR-2.1: The system shall provide a text-based Command Line Interface (CLI) that requires no graphical environment to run.</text:p>
          <text:p text:style-name="P55"><text:soft-page-break/>6.3 Reliability</text:p>
        </text:list-item>
        <text:list-item>
          <text:p text:style-name="P54">NFR-3.1: The system shall gracefully handle syntax errors or invalid commands by providing a descriptive error message without crashing.</text:p>
        </text:list-item>
      </text:list>
      <text:p text:style-name="P56"/>
      <text:p text:style-name="P57" loext:marker-style-name="T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bdulla Juwaied</meta:initial-creator>
    <meta:editing-cycles>12</meta:editing-cycles>
    <meta:creation-date>2026-03-01T16:25:00</meta:creation-date>
    <dc:date>2026-05-05T15:26:38.587112729</dc:date>
    <meta:editing-duration>PT34M58S</meta:editing-duration>
    <meta:generator>LibreOffice/26.2.2.2$Linux_X86_64 LibreOffice_project/620$Build-2</meta:generator>
    <meta:document-statistic meta:table-count="1" meta:image-count="4" meta:object-count="0" meta:page-count="8" meta:paragraph-count="112" meta:word-count="1339" meta:character-count="9046" meta:non-whitespace-character-count="7824"/>
    <meta:user-defined meta:name="AppVersion">16.0000</meta:user-defined>
    <meta:user-defined meta:name="GrammarlyDocumentId">e98e1e1c-2b2f-4374-a1ed-6acc5618dd85</meta:user-defined>
    <meta:template xlink:type="simple" xlink:actuate="onRequest" xlink:title="Normal" xlink:href=""/>
  </office:meta>
</office:document-meta>
</file>